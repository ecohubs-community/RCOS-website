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1/onboarding-protocol" office:name=""><text:span text:style-name="Definition">https://rcos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1-membership-system#32-entry-and-onboarding" office:name=""><text:span text:style-name="Definition">§3.2</text:span></text:a>, <text:a xlink:type="simple" xlink:href="https://rcos.ecohubs.community/articles/rcos-core/v0-1/layer-1-membership-system#33-trial-and-evaluation" office:name=""><text:span text:style-name="Definition">§3.3</text:span></text:a>, <text:a xlink:type="simple" xlink:href="https://rcos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rcos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rcos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rcos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rcos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rcos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rcos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rcos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rcos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rcos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rcos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1Z</meta:creation-date>
    <dc:date>2026-06-26T01:38:41Z</dc:date>
    <meta:user-defined meta:name="title-meta" meta:value-type="string">Onboarding Protocol</meta:user-defined>
  </office:meta>
</office:document-meta>
</file>