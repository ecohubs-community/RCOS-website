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2/governance-protocol" office:name=""><text:span text:style-name="Definition">https://rcos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2-governance-decision-logic#45-governance-protocol" office:name=""><text:span text:style-name="Definition">§4.5</text:span></text:a>, <text:a xlink:type="simple" xlink:href="https://rcos.ecohubs.community/articles/rcos-core/v0-1/layer-2-governance-decision-logic#46-safeguards-and-failure-modes" office:name=""><text:span text:style-name="Definition">§4.6</text:span></text:a>, <text:a xlink:type="simple" xlink:href="https://rcos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rcos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rcos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rcos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rcos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rcos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rcos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rcos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rcos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Governance Protocol</meta:user-defined>
  </office:meta>
</office:document-meta>
</file>