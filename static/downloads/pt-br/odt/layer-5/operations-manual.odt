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6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manual-de-operações"/>Manual de Operações<text:bookmark-end text:name="manual-de-operações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5/operations-manual" office:name=""><text:span text:style-name="Definition">https://rcos.ecohubs.community/pt-br/articles/rcos-templates/layer-5/operations-manual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5 — Operações e Coordenação</text:p>
        </text:list-item>
        <text:list-item>
          <text:p text:style-name="P2"><text:span text:style-name="T1">Status:</text:span> Modelo — adapte para 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5-operations-coordination#71-roles-and-responsibilities" office:name=""><text:span text:style-name="Definition">§7.1</text:span></text:a>, <text:a xlink:type="simple" xlink:href="https://rcos.ecohubs.community/pt-br/articles/rcos-core/v0-1/layer-5-operations-coordination#73-documentation-and-information-flow" office:name=""><text:span text:style-name="Definition">§7.3</text:span></text:a>, <text:a xlink:type="simple" xlink:href="https://rcos.ecohubs.community/pt-br/articles/rcos-core/v0-1/layer-5-operations-coordination#74-workload-and-capacity-boundaries" office:name=""><text:span text:style-name="Definition">§7.4</text:span></text:a>, <text:a xlink:type="simple" xlink:href="https://rcos.ecohubs.community/pt-br/articles/rcos-core/v0-1/layer-5-operations-coordination#75-operational-continuity" office:name=""><text:span text:style-name="Definition">§7.5</text:span></text:a>, <text:a xlink:type="simple" xlink:href="https://rcos.ecohubs.community/pt-br/articles/rcos-core/v0-1/layer-5-operations-coordination#76-artifacts" office:name=""><text:span text:style-name="Definition">§7.6</text:span></text:a></text:p>
        </text:list-item>
      </text:list>
      <text:p text:style-name="Horizontal_20_Line"/>
      <text:h text:style-name="Heading_20_2" text:outline-level="2"><text:bookmark-start text:name="processos-operacionais-essenciais"/>Processos Operacionais Essenciais<text:bookmark-end text:name="processos-operacionais-essenciais"/></text:h>
      <text:p text:style-name="First_20_paragraph"><text:span text:style-name="T2">Cláusulas RCOS: </text:span><text:a xlink:type="simple" xlink:href="https://rcos.ecohubs.community/pt-br/articles/rcos-core/v0-1/layer-5-operations-coordination#73-documentation-and-information-flow" office:name=""><text:span text:style-name="Definition"><text:span text:style-name="T2">7.3.4</text:span></text:span></text:a><text:span text:style-name="T2">, </text:span><text:a xlink:type="simple" xlink:href="https://rcos.ecohubs.community/pt-br/articles/rcos-core/v0-1/layer-5-operations-coordination#77-layer-invariants" office:name=""><text:span text:style-name="Definition"><text:span text:style-name="T2">7.7.2</text:span></text:span></text:a><text:span text:style-name="T2">, </text:span><text:a xlink:type="simple" xlink:href="https://rcos.ecohubs.community/pt-br/articles/rcos-core/v0-1/layer-5-operations-coordination#76-artifacts" office:name=""><text:span text:style-name="Definition"><text:span text:style-name="T2">7.6.3</text:span></text:span></text:a></text:p>
      <text:p text:style-name="P3"><text:span text:style-name="T1">Justificativa — Por que documentar processos críticos</text:span></text:p>
      <text:p text:style-name="P3">Se um processo só existe na cabeça de uma pessoa, a comunidade depende dela aparecer — para sempre. Escrever os processos críticos, com pessoas responsáveis nomeadas, é o que transforma conhecimento privado em um ativo comunitário que sobrevive a transições, ausências e saídas.</text:p>
      <text:p text:style-name="P4"><text:span text:style-name="T1">Instruções — Como preencher</text:span></text:p>
      <text:p text:style-name="P4">Para cada processo crítico recorrente (acolhimento, saída, publicação de propostas, registro de contribuições, cadência de reuniões, gestão de tesouraria, revisão de acesso a plataformas), nomeie uma pessoa responsável e uma breve descrição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Processo</text:p>
            </table:table-cell>
            <table:table-cell table:style-name="TableHeaderRowCell" office:value-type="string">
              <text:p text:style-name="Table_20_Heading">Quem</text:p>
            </table:table-cell>
            <table:table-cell table:style-name="TableHeaderRowCell" office:value-type="string">
              <text:p text:style-name="Table_20_Heading">Detalhe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Acolhimento (Camada 1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Saída de membro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Saída e Separação (Camada 1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Publicação de proposta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Governança (Camada 2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Registro de contribuiçõe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Economia Interna (Camada 3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Reunião recorrente&gt;</text:span></text:p>
          </table:table-cell>
          <table:table-cell table:style-name="TableRowCell" office:value-type="string">
            <text:p text:style-name="Table_20_Contents"><text:span text:style-name="T2">&lt;facilitador(a)&gt;</text:span></text:p>
          </table:table-cell>
          <table:table-cell table:style-name="TableRowCell" office:value-type="string">
            <text:p text:style-name="Table_20_Contents"><text:span text:style-name="T2">&lt;publicação de pauta; notas; acompanhamento de açõe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Gestão de tesouraria&gt;</text:span></text:p>
          </table:table-cell>
          <table:table-cell table:style-name="TableRowCell" office:value-type="string">
            <text:p text:style-name="Table_20_Contents"><text:span text:style-name="T2">&lt;responsável financeiro&gt;</text:span></text:p>
          </table:table-cell>
          <table:table-cell table:style-name="TableRowCell" office:value-type="string">
            <text:p text:style-name="Table_20_Contents"><text:span text:style-name="T2">&lt;ver Regulamento de Tesouraria (Camada 3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Revisão de acesso a plataformas&gt;</text:span></text:p>
          </table:table-cell>
          <table:table-cell table:style-name="TableRowCell" office:value-type="string">
            <text:p text:style-name="Table_20_Contents"><text:span text:style-name="T2">&lt;responsável por infraestrutura&gt;</text:span></text:p>
          </table:table-cell>
          <table:table-cell table:style-name="TableRowCell" office:value-type="string">
            <text:p text:style-name="Table_20_Contents"><text:span text:style-name="T2">&lt;cadência de revisão; revogação de acesso de membros que saíram&gt;</text:span></text:p>
          </table:table-cell>
        </table:table-row>
      </table:table>
      <text:h text:style-name="Heading_20_2" text:outline-level="2"><text:bookmark-start text:name="responsabilidades-temporárias-e-ad-hoc"/>Responsabilidades Temporárias e Ad-Hoc<text:bookmark-end text:name="responsabilidades-temporárias-e-ad-hoc"/></text:h>
      <text:p text:style-name="First_20_paragraph"><text:span text:style-name="T2">Cláusulas RCOS: </text:span><text:a xlink:type="simple" xlink:href="https://rcos.ecohubs.community/pt-br/articles/rcos-core/v0-1/layer-5-operations-coordination#71-roles-and-responsibilities" office:name=""><text:span text:style-name="Definition"><text:span text:style-name="T2">7.1.5</text:span></text:span></text:a><text:span text:style-name="T2">, </text:span><text:a xlink:type="simple" xlink:href="https://rcos.ecohubs.community/pt-br/articles/rcos-core/v0-1/layer-5-operations-coordination#71-roles-and-responsibilities" office:name=""><text:span text:style-name="Definition"><text:span text:style-name="T2">7.1.4</text:span></text:span></text:a><text:span text:style-name="T2">, </text:span><text:a xlink:type="simple" xlink:href="https://rcos.ecohubs.community/pt-br/articles/rcos-core/v0-1/layer-5-operations-coordination#77-layer-invariants" office:name=""><text:span text:style-name="Definition"><text:span text:style-name="T2">7.7.1</text:span></text:span></text:a></text:p>
      <text:p text:style-name="P5"><text:span text:style-name="T1">Justificativa — Por que limitar as responsabilidades temporárias</text:span></text:p>
      <text:p text:style-name="P5">Tarefas ad-hoc silenciosamente se cristalizam em trabalhos permanentes não remunerados — geralmente sobre quem disse sim uma vez. Um prazo rígido e uma revisão obrigatória fazem a diferença entre “cobri por uma semana” e “aparentemente esse é o meu papel agora”.</text:p>
      <text:p text:style-name="P6"><text:span text:style-name="T1">Instruções — Como preencher</text:span></text:p>
      <text:p text:style-name="P6">Estabeleça que qualquer responsabilidade temporária DEVE ter prazo definido na atribuição, ser documentada, revisada antes da expiração e formalizada ou encerrada.</text:p>
      <text:p text:style-name="First_20_paragraph">Quando uma tarefa ou responsabilidade for atribuída temporariamente, ela DEVE ser:</text:p>
      <text:list text:style-name="L3">
        <text:list-item>
          <text:p text:style-name="P7"><text:span text:style-name="T2">&lt;Explicitamente limitada no tempo desde o início (data final específica ou condição de conclusão).&gt;</text:span></text:p>
        </text:list-item>
        <text:list-item>
          <text:p text:style-name="P7"><text:span text:style-name="T2">&lt;Documentada como temporária no momento da atribuição.&gt;</text:span></text:p>
        </text:list-item>
        <text:list-item>
          <text:p text:style-name="P7"><text:span text:style-name="T2">&lt;Revisada antes da data final; convertida em papel formal ou encerrada.&gt;</text:span></text:p>
        </text:list-item>
      </text:list>
      <text:p text:style-name="First_20_paragraph"><text:span text:style-name="T2">&lt;Duração máxima de qualquer responsabilidade temporária antes que precise ser formalmente atribuída ou encerrada — por exemplo, 90 dias.&gt;</text:span> Se uma responsabilidade temporária não tiver responsável após sua data final, ela expira; não é transferida implicitamente.</text:p>
      <text:p text:style-name="Horizontal_20_Line"/>
      <text:h text:style-name="Heading_20_2" text:outline-level="2"><text:bookmark-start text:name="interfaces-entre-papéis-e-domínios"/>Interfaces entre Papéis e Domínios<text:bookmark-end text:name="interfaces-entre-papéis-e-domínios"/></text:h>
      <text:p text:style-name="First_20_paragraph"><text:span text:style-name="T2">Cláusulas RCOS: </text:span><text:a xlink:type="simple" xlink:href="https://rcos.ecohubs.community/pt-br/articles/rcos-core/v0-1/layer-5-operations-coordination#76-artifacts" office:name=""><text:span text:style-name="Definition"><text:span text:style-name="T2">7.6.3</text:span></text:span></text:a><text:span text:style-name="T2">, </text:span><text:a xlink:type="simple" xlink:href="https://rcos.ecohubs.community/pt-br/articles/rcos-core/v0-1/layer-5-operations-coordination#73-documentation-and-information-flow" office:name=""><text:span text:style-name="Definition"><text:span text:style-name="T2">7.3.4</text:span></text:span></text:a></text:p>
      <text:p text:style-name="P8"><text:span text:style-name="T1">Justificativa — Por que mapear as transições explicitamente</text:span></text:p>
      <text:p text:style-name="P8">A maioria das falhas operacionais não acontece dentro de um papel, mas entre papéis — nas fronteiras onde o trabalho passa de um responsável para outro. Nomear as transições transforma dependências invisíveis em revisáveis e evita falhas do tipo “achei que você tivesse cuidado disso”.</text:p>
      <text:p text:style-name="P9"><text:span text:style-name="T1">Instruções — Como preencher</text:span></text:p>
      <text:p text:style-name="P9">Para cada par de papéis que passa trabalho entre si, nomeie a transição e o tipo de trabalho transferido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De</text:p>
            </table:table-cell>
            <table:table-cell table:style-name="TableHeaderRowCell" office:value-type="string">
              <text:p text:style-name="Table_20_Heading">Para</text:p>
            </table:table-cell>
            <table:table-cell table:style-name="TableHeaderRowCell" office:value-type="string">
              <text:p text:style-name="Table_20_Heading">Trans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o que é entregue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h text:style-name="Heading_20_2" text:outline-level="2"><text:bookmark-start text:name="limites-de-carga-de-trabalho"/>Limites de Carga de Trabalho<text:bookmark-end text:name="limites-de-carga-de-trabalho"/></text:h>
      <text:p text:style-name="First_20_paragraph"><text:span text:style-name="T2">Cláusulas RCOS: </text:span><text:a xlink:type="simple" xlink:href="https://rcos.ecohubs.community/pt-br/articles/rcos-core/v0-1/layer-5-operations-coordination#74-workload-and-capacity-boundaries" office:name=""><text:span text:style-name="Definition"><text:span text:style-name="T2">7.4.1</text:span></text:span></text:a><text:span text:style-name="T2">, </text:span><text:a xlink:type="simple" xlink:href="https://rcos.ecohubs.community/pt-br/articles/rcos-core/v0-1/layer-5-operations-coordination#74-workload-and-capacity-boundaries" office:name=""><text:span text:style-name="Definition"><text:span text:style-name="T2">7.4.2</text:span></text:span></text:a><text:span text:style-name="T2">, </text:span><text:a xlink:type="simple" xlink:href="https://rcos.ecohubs.community/pt-br/articles/rcos-core/v0-1/layer-5-operations-coordination#74-workload-and-capacity-boundaries" office:name=""><text:span text:style-name="Definition"><text:span text:style-name="T2">7.4.3</text:span></text:span></text:a><text:span text:style-name="T2">, </text:span><text:a xlink:type="simple" xlink:href="https://rcos.ecohubs.community/pt-br/articles/rcos-core/v0-1/layer-5-operations-coordination#77-layer-invariants" office:name=""><text:span text:style-name="Definition"><text:span text:style-name="T2">7.7.3</text:span></text:span></text:a></text:p>
      <text:p text:style-name="P10"><text:span text:style-name="T1">Justificativa — Por que tornar os limites de carga explícitos</text:span></text:p>
      <text:p text:style-name="P10">Carga de coordenação sem limites é o modo padrão de falha de comunidades voluntárias — ela silenciosamente esgota as pessoas mais comprometidas até que elas saiam. Limites explícitos e revisáveis fazem da capacidade uma preocupação compartilhada em vez de um fardo privado.</text:p>
      <text:p text:style-name="P11"><text:span text:style-name="T1">Instruções — Como preencher</text:span></text:p>
      <text:p text:style-name="P11">Defina limites para carga de reuniões, carga de papéis, expectativas de tempo de resposta e o caminho para renegociar responsabilidades.</text:p>
      <text:list text:style-name="L4">
        <text:list-item>
          <text:p text:style-name="P12"><text:span text:style-name="T1">Carga de reuniões:</text:span> <text:span text:style-name="T2">&lt;cadência das reuniões recorrentes e duração máxima; regras para reuniões extraordinárias.&gt;</text:span></text:p>
        </text:list-item>
        <text:list-item>
          <text:p text:style-name="P12"><text:span text:style-name="T1">Carga de papéis:</text:span> <text:span text:style-name="T2">&lt;limite, se houver; regra para sinalizar sobrecarga; janela de resolução.&gt;</text:span></text:p>
        </text:list-item>
        <text:list-item>
          <text:p text:style-name="P12"><text:span text:style-name="T1">Expectativas de tempo de resposta:</text:span> <text:span text:style-name="T2">&lt;assíncrono não urgente; operacional urgente; crítico para a segurança.&gt;</text:span></text:p>
        </text:list-item>
        <text:list-item>
          <text:p text:style-name="P12"><text:span text:style-name="T1">Renegociação e alívio:</text:span> <text:span text:style-name="T2">&lt;processo para redistribuir responsabilidades; janela de resolução.&gt;</text:span></text:p>
        </text:list-item>
      </text:list>
      <text:h text:style-name="Heading_20_2" text:outline-level="2"><text:bookmark-start text:name="continuidade-operacional"/>Continuidade Operacional<text:bookmark-end text:name="continuidade-operacional"/></text:h>
      <text:p text:style-name="First_20_paragraph"><text:span text:style-name="T2">Cláusulas RCOS: </text:span><text:a xlink:type="simple" xlink:href="https://rcos.ecohubs.community/pt-br/articles/rcos-core/v0-1/layer-5-operations-coordination#75-operational-continuity" office:name=""><text:span text:style-name="Definition"><text:span text:style-name="T2">7.5.1</text:span></text:span></text:a><text:span text:style-name="T2">, </text:span><text:a xlink:type="simple" xlink:href="https://rcos.ecohubs.community/pt-br/articles/rcos-core/v0-1/layer-5-operations-coordination#75-operational-continuity" office:name=""><text:span text:style-name="Definition"><text:span text:style-name="T2">7.5.2</text:span></text:span></text:a><text:span text:style-name="T2">, </text:span><text:a xlink:type="simple" xlink:href="https://rcos.ecohubs.community/pt-br/articles/rcos-core/v0-1/layer-5-operations-coordination#75-operational-continuity" office:name=""><text:span text:style-name="Definition"><text:span text:style-name="T2">7.5.3</text:span></text:span></text:a></text:p>
      <text:p text:style-name="P13"><text:span text:style-name="T1">Justificativa — Por que planejar a continuidade agora</text:span></text:p>
      <text:p text:style-name="P13">Uma comunidade que depende de uma pessoa insubstituível está a uma doença, um conflito ou uma saída do colapso. Nomear os pontos únicos de falha — honestamente — e incorporar a transição em cada papel é o que mantém a comunidade sobrevivendo aos seus fundadores.</text:p>
      <text:p text:style-name="P14"><text:span text:style-name="T1">Instruções — Como preencher</text:span></text:p>
      <text:p text:style-name="P14">Nomeie os atuais pontos únicos de falha honestamente. Estabeleça a exigência de transição para cada papel e a cadência de revisão da continuidade.</text:p>
      <text:list text:style-name="L5">
        <text:list-item>
          <text:p text:style-name="P15"><text:span text:style-name="T1">Estado atual:</text:span> <text:span text:style-name="T2">&lt;lista honesta de pontos únicos de falha; plano de recrutamento para reduzir a concentração.&gt;</text:span></text:p>
        </text:list-item>
        <text:list-item>
          <text:p text:style-name="P15"><text:span text:style-name="T1">Mecanismos de transição:</text:span> <text:span text:style-name="T2">&lt;consulte as exigências de transição por papel no Registro de Papéis; a transição DEVE ser concluída antes que um papel seja desocupado.&gt;</text:span></text:p>
        </text:list-item>
        <text:list-item>
          <text:p text:style-name="P15"><text:span text:style-name="T1">Cadência de revisão da continuidade:</text:span> <text:span text:style-name="T2">&lt;trimestral; ad hoc em caso de mudança de papel.&gt;</text:span></text:p>
        </text:list-item>
      </text:list>
      <text:h text:style-name="Heading_20_2" text:outline-level="2"><text:bookmark-start text:name="fluxo-de-informação-e-antibloqueio-de-acesso"/>Fluxo de Informação e Antibloqueio de Acesso<text:bookmark-end text:name="fluxo-de-informação-e-antibloqueio-de-acesso"/></text:h>
      <text:p text:style-name="First_20_paragraph"><text:span text:style-name="T2">Cláusulas RCOS: </text:span><text:a xlink:type="simple" xlink:href="https://rcos.ecohubs.community/pt-br/articles/rcos-core/v0-1/layer-5-operations-coordination#73-documentation-and-information-flow" office:name=""><text:span text:style-name="Definition"><text:span text:style-name="T2">7.3.5</text:span></text:span></text:a><text:span text:style-name="T2">, </text:span><text:a xlink:type="simple" xlink:href="https://rcos.ecohubs.community/pt-br/articles/rcos-core/v0-1/layer-5-operations-coordination#77-layer-invariants" office:name=""><text:span text:style-name="Definition"><text:span text:style-name="T2">7.7.4</text:span></text:span></text:a><text:span text:style-name="T2">, </text:span><text:a xlink:type="simple" xlink:href="https://rcos.ecohubs.community/pt-br/articles/rcos-core/v0-1/layer-5-operations-coordination#73-documentation-and-information-flow" office:name=""><text:span text:style-name="Definition"><text:span text:style-name="T2">7.3.2</text:span></text:span></text:a></text:p>
      <text:p text:style-name="P16"><text:span text:style-name="T1">Justificativa — Por que tratar o acesso à informação como uma questão de governança</text:span></text:p>
      <text:p text:style-name="P16">Quem controla o acesso à informação controla a comunidade, querendo ou não. Tornar as regras de acesso explícitas — e proibir pontos únicos de acesso — é o que impede que guardiões informais acumulem o tipo de poder que o sistema de governança deveria conter.</text:p>
      <text:p text:style-name="P17"><text:span text:style-name="T1">Instruções — Como preencher</text:span></text:p>
      <text:p text:style-name="P17">Estabeleça quais registros são abertos a todos os Membros Plenos, a janela de resposta para solicitações de informação e a regra contra pontos únicos de acesso a informações relevantes para a governança.</text:p>
      <text:list text:style-name="L6">
        <text:list-item>
          <text:p text:style-name="P18"><text:span text:style-name="T2">&lt;Decisões de governança acessíveis a todos os Membros Plenos.&gt;</text:span></text:p>
        </text:list-item>
        <text:list-item>
          <text:p text:style-name="P18"><text:span text:style-name="T2">&lt;Notas de reuniões publicadas em até X horas.&gt;</text:span></text:p>
        </text:list-item>
        <text:list-item>
          <text:p text:style-name="P18"><text:span text:style-name="T2">&lt;Estado de adesão e atribuições de papéis acessíveis.&gt;</text:span></text:p>
        </text:list-item>
        <text:list-item>
          <text:p text:style-name="P18"><text:span text:style-name="T2">&lt;Registros de contribuições acessíveis.&gt;</text:span></text:p>
        </text:list-item>
        <text:list-item>
          <text:p text:style-name="P18"><text:span text:style-name="T2">&lt;Janela de resposta para solicitações de informação.&gt;</text:span></text:p>
        </text:list-item>
        <text:list-item>
          <text:p text:style-name="P18"><text:span text:style-name="T2">&lt;Negar acesso a informações às quais os membros têm direito é um gatilho de responsabilização sob a Camada 4.&gt;</text:span></text:p>
        </text:list-item>
        <text:list-item>
          <text:p text:style-name="P18"><text:span text:style-name="T2">&lt;Nenhum papel ou indivíduo PODE ser o único ponto de acesso a informações requeridas por outros responsáveis por papéis.&gt;</text:span></text:p>
        </text:list-item>
      </text:list>
      <text:p text:style-name="Horizontal_20_Line"/>
      <text:h text:style-name="Heading_20_2" text:outline-level="2"><text:bookmark-start text:name="localização-da-documentação-e-procedimentos-de-atualização"/>Localização da Documentação e Procedimentos de Atualização<text:bookmark-end text:name="localização-da-documentação-e-procedimentos-de-atualização"/></text:h>
      <text:p text:style-name="First_20_paragraph"><text:span text:style-name="T2">Cláusulas RCOS: </text:span><text:a xlink:type="simple" xlink:href="https://rcos.ecohubs.community/pt-br/articles/rcos-core/v0-1/layer-5-operations-coordination#73-documentation-and-information-flow" office:name=""><text:span text:style-name="Definition"><text:span text:style-name="T2">7.3.1</text:span></text:span></text:a><text:span text:style-name="T2">, </text:span><text:a xlink:type="simple" xlink:href="https://rcos.ecohubs.community/pt-br/articles/rcos-core/v0-1/layer-5-operations-coordination#73-documentation-and-information-flow" office:name=""><text:span text:style-name="Definition"><text:span text:style-name="T2">7.3.2</text:span></text:span></text:a><text:span text:style-name="T2">, </text:span><text:a xlink:type="simple" xlink:href="https://rcos.ecohubs.community/pt-br/articles/rcos-core/v0-1/layer-5-operations-coordination#73-documentation-and-information-flow" office:name=""><text:span text:style-name="Definition"><text:span text:style-name="T2">7.3.3</text:span></text:span></text:a></text:p>
      <text:p text:style-name="P19"><text:span text:style-name="T1">Justificativa — Por que nomear onde cada documento vive</text:span></text:p>
      <text:p text:style-name="P19">Se ninguém consegue dizer onde mora a versão canônica de algo, não há versão canônica. Nomear a localização, a pessoa responsável e a cadência de revisão para cada tipo de documento é o que torna a memória da comunidade auditável em vez de folclórica.</text:p>
      <text:p text:style-name="P20"><text:span text:style-name="T1">Instruções — Como preencher</text:span></text:p>
      <text:p text:style-name="P20">Para cada tipo de documento, nomeie a localização canônica, a pessoa responsável e a cadência de revisão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Tipo de documento</text:p>
            </table:table-cell>
            <table:table-cell table:style-name="TableHeaderRowCell" office:value-type="string">
              <text:p text:style-name="Table_20_Heading">Localização</text:p>
            </table:table-cell>
            <table:table-cell table:style-name="TableHeaderRowCell" office:value-type="string">
              <text:p text:style-name="Table_20_Heading">Responsável</text:p>
            </table:table-cell>
            <table:table-cell table:style-name="TableHeaderRowCell" office:value-type="string">
              <text:p text:style-name="Table_20_Heading">Cadência de revisão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ocalização&gt;</text:span></text:p>
          </table:table-cell>
          <table:table-cell table:style-name="TableRowCell" office:value-type="string">
            <text:p text:style-name="Table_20_Contents"><text:span text:style-name="T2">&lt;responsável&gt;</text:span></text:p>
          </table:table-cell>
          <table:table-cell table:style-name="TableRowCell" office:value-type="string">
            <text:p text:style-name="Table_20_Contents"><text:span text:style-name="T2">&lt;cadência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ocalização&gt;</text:span></text:p>
          </table:table-cell>
          <table:table-cell table:style-name="TableRowCell" office:value-type="string">
            <text:p text:style-name="Table_20_Contents"><text:span text:style-name="T2">&lt;responsável&gt;</text:span></text:p>
          </table:table-cell>
          <table:table-cell table:style-name="TableRowCell" office:value-type="string">
            <text:p text:style-name="Table_20_Contents"><text:span text:style-name="T2">&lt;cadência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Notas de reuniões&gt;</text:span></text:p>
          </table:table-cell>
          <table:table-cell table:style-name="TableRowCell" office:value-type="string">
            <text:p text:style-name="Table_20_Contents"><text:span text:style-name="T2">&lt;localização&gt;</text:span></text:p>
          </table:table-cell>
          <table:table-cell table:style-name="TableRowCell" office:value-type="string">
            <text:p text:style-name="Table_20_Contents"><text:span text:style-name="T2">&lt;responsável&gt;</text:span></text:p>
          </table:table-cell>
          <table:table-cell table:style-name="TableRowCell" office:value-type="string">
            <text:p text:style-name="Table_20_Contents"><text:span text:style-name="T2">&lt;cadência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Propostas de governança&gt;</text:span></text:p>
          </table:table-cell>
          <table:table-cell table:style-name="TableRowCell" office:value-type="string">
            <text:p text:style-name="Table_20_Contents"><text:span text:style-name="T2">&lt;localização&gt;</text:span></text:p>
          </table:table-cell>
          <table:table-cell table:style-name="TableRowCell" office:value-type="string">
            <text:p text:style-name="Table_20_Contents"><text:span text:style-name="T2">&lt;responsável&gt;</text:span></text:p>
          </table:table-cell>
          <table:table-cell table:style-name="TableRowCell" office:value-type="string">
            <text:p text:style-name="Table_20_Contents"><text:span text:style-name="T2">&lt;cadência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Registros de contribuições&gt;</text:span></text:p>
          </table:table-cell>
          <table:table-cell table:style-name="TableRowCell" office:value-type="string">
            <text:p text:style-name="Table_20_Contents"><text:span text:style-name="T2">&lt;localização&gt;</text:span></text:p>
          </table:table-cell>
          <table:table-cell table:style-name="TableRowCell" office:value-type="string">
            <text:p text:style-name="Table_20_Contents"><text:span text:style-name="T2">&lt;responsável&gt;</text:span></text:p>
          </table:table-cell>
          <table:table-cell table:style-name="TableRowCell" office:value-type="string">
            <text:p text:style-name="Table_20_Contents"><text:span text:style-name="T2">&lt;cadência&gt;</text:span></text:p>
          </table:table-cell>
        </table:table-row>
      </table:table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7">
        <text:list-item>
          <text:p text:style-name="P21"><text:span text:style-name="T1">Adotado em:</text:span> </text:p>
        </text:list-item>
        <text:list-item>
          <text:p text:style-name="P21"><text:span text:style-name="T1">Tipo de decisão:</text:span> Estratégica</text:p>
        </text:list-item>
        <text:list-item>
          <text:p text:style-name="P21"><text:span text:style-name="T1">Versão:</text:span> &lt;versão&gt;</text:p>
        </text:list-item>
        <text:list-item>
          <text:p text:style-name="P21"><text:span text:style-name="T1">Registro da decisão:</text:span> &lt;link para o registro da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7Z</meta:creation-date>
    <dc:date>2026-06-26T01:38:57Z</dc:date>
    <meta:user-defined meta:name="title-meta" meta:value-type="string">Manual de Operações</meta:user-defined>
  </office:meta>
</office:document-meta>
</file>