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cional de Comunidade Regenerativa</text:span></text:p>
      <text:h text:style-name="Heading_20_1" text:outline-level="1"><text:bookmark-start text:name="registro-de-estados-de-associação"/>Registro de Estados de Associação<text:bookmark-end text:name="registro-de-estados-de-associação"/></text:h>
      <text:list text:style-name="L1">
        <text:list-item>
          <text:p text:style-name="P1"><text:span text:style-name="T1">Gerado em:</text:span> 2026-06-26</text:p>
        </text:list-item>
        <text:list-item>
          <text:p text:style-name="P1"><text:span text:style-name="T1">Fonte (versão mais recente):</text:span> <text:a xlink:type="simple" xlink:href="https://rcos.ecohubs.community/pt-br/articles/rcos-templates/layer-1/membership-state-registry" office:name=""><text:span text:style-name="Definition">https://rcos.ecohubs.community/pt-br/articles/rcos-templates/layer-1/membership-state-registry</text:span></text:a></text:p>
        </text:list-item>
        <text:list-item>
          <text:p text:style-name="P1"><text:span text:style-name="T1">Todos os modelos RCOS:</text:span> <text:a xlink:type="simple" xlink:href="https://rcos.ecohubs.community/pt-br/articles/rcos-templates" office:name=""><text:span text:style-name="Definition">https://rcos.ecohubs.community/pt-b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mada:</text:span> 1 — Sistema de Associação</text:p>
        </text:list-item>
        <text:list-item>
          <text:p text:style-name="P2"><text:span text:style-name="T1">Status:</text:span> Modelo — adapte para sua comunidade</text:p>
        </text:list-item>
        <text:list-item>
          <text:p text:style-name="P2"><text:span text:style-name="T1">Referência RCOS:</text:span> <text:a xlink:type="simple" xlink:href="https://rcos.ecohubs.community/pt-br/articles/rcos-core/v0-1/layer-1-membership-system#31-membership-states" office:name=""><text:span text:style-name="Definition">§3.1</text:span></text:a>, <text:a xlink:type="simple" xlink:href="https://rcos.ecohubs.community/pt-br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estados-de-associação-definidos"/>Estados de Associação Definidos<text:bookmark-end text:name="estados-de-associação-definidos"/></text:h>
      <text:p text:style-name="First_20_paragraph"><text:span text:style-name="T2">Cláusulas RCOS: </text:span><text:a xlink:type="simple" xlink:href="https://rcos.ecohubs.community/pt-br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rcos.ecohubs.community/pt-br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rcos.ecohubs.community/pt-br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rcos.ecohubs.community/pt-br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rcos.ecohubs.community/pt-br/articles/rcos-core/v0-1/layer-1-membership-system#31-membership-states" office:name=""><text:span text:style-name="Definition"><text:span text:style-name="T2">3.1.5</text:span></text:span></text:a></text:p>
      <text:p text:style-name="P3"><text:span text:style-name="T1">Justificativa — Por que uma única tabela de estados</text:span></text:p>
      <text:p text:style-name="P3">Direitos e obrigações espalhados por vários documentos acabam divergindo. Reunir cada estado, seus direitos, suas obrigações e suas transições em uma única tabela torna o sistema de associação auditável de relance — você consegue ver cada porta de entrada e de saída da comunidade, e o que cada uma concede. Se dois documentos algum dia discordarem, este registro é o desempate.</text:p>
      <text:p text:style-name="P4"><text:span text:style-name="T1">Instruções — Como preencher</text:span></text:p>
      <text:p text:style-name="P4">Defina cada estado de associação que sua comunidade reconhece (por exemplo, Candidato, Membro em Período de Experiência, Membro Pleno, Membro Egresso). Para cada um, liste direitos, obrigações, condição de entrada e condição de saída. Mantenha os estados mutuamente exclusivos — nenhuma pessoa pode estar em dois estados ao mesmo tempo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Estado</text:p>
            </table:table-cell>
            <table:table-cell table:style-name="TableHeaderRowCell" office:value-type="string">
              <text:p text:style-name="Table_20_Heading">Direitos</text:p>
            </table:table-cell>
            <table:table-cell table:style-name="TableHeaderRowCell" office:value-type="string">
              <text:p text:style-name="Table_20_Heading">Obrigações</text:p>
            </table:table-cell>
            <table:table-cell table:style-name="TableHeaderRowCell" office:value-type="string">
              <text:p text:style-name="Table_20_Heading">Condição de entrada</text:p>
            </table:table-cell>
            <table:table-cell table:style-name="TableHeaderRowCell" office:value-type="string">
              <text:p text:style-name="Table_20_Heading">Condição de saíd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stado 1, por exemplo, Candidato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obrigaçõe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aída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stado 2, por exemplo, Membro em Período de Experiência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obrigaçõe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aída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stado 3, por exemplo, Membro Pleno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obrigaçõe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aída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stado 4, por exemplo, Membro Egresso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obrigaçõe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aída&gt;</text:span></text:p>
          </table:table-cell>
        </table:table-row>
      </table:table>
      <text:p text:style-name="P5">Nenhuma pessoa pode estar em múltiplos estados de associação ao mesmo tempo. Nenhum direito ou obrigação pode ser assumido fora do estado de associação atual da pessoa.</text:p>
      <text:h text:style-name="Heading_20_2" text:outline-level="2"><text:bookmark-start text:name="notas-técnicas"/>Notas Técnicas<text:bookmark-end text:name="notas-técnicas"/></text:h>
      <text:p text:style-name="P6"><text:span text:style-name="T1">Justificativa — Por que preservar dados após a saída</text:span></text:p>
      <text:p text:style-name="P6">A história da comunidade pertence à comunidade, não a qualquer conta individual. Manter registros de contribuição após a saída protege a integridade das trilhas de auditoria, do histórico de governança e da contabilidade de reconhecimento — ao mesmo tempo em que revogar o acesso e remover a pessoa das listagens ativas respeita o caráter definitivo da sua partida.</text:p>
      <text:p text:style-name="P7"><text:span text:style-name="T1">Instruções — Como preencher</text:span></text:p>
      <text:p text:style-name="P7">Descreva quais registros persistem após a saída, onde as atribuições de estado são acompanhadas operacionalmente, e como a revogação de acesso interage com os recursos das plataformas utilizadas.</text:p>
      <text:list text:style-name="L3">
        <text:list-item>
          <text:p text:style-name="P8"><text:span text:style-name="T2">&lt;Histórico de contribuição e governança mantido após a saída; descreva a política de retenção.&gt;</text:span></text:p>
        </text:list-item>
        <text:list-item>
          <text:p text:style-name="P8"><text:span text:style-name="T2">&lt;Membros egressos são removidos das listagens ativas de membros; descreva a revogação de acesso por plataforma.&gt;</text:span></text:p>
        </text:list-item>
        <text:list-item>
          <text:p text:style-name="P8"><text:span text:style-name="T2">&lt;Local operacional das atribuições de estado — veja </text:span>“<text:span text:style-name="T2">Lista Atual de Membros</text:span>”<text:span text:style-name="T2"> abaixo.&gt;</text:span></text:p>
        </text:list-item>
      </text:list>
      <text:h text:style-name="Heading_20_2" text:outline-level="2"><text:bookmark-start text:name="lista-atual-de-membros"/>Lista Atual de Membros<text:bookmark-end text:name="lista-atual-de-membros"/></text:h>
      <text:p text:style-name="First_20_paragraph"><text:span text:style-name="T2">Cláusulas RCOS: </text:span><text:a xlink:type="simple" xlink:href="https://rcos.ecohubs.community/pt-br/articles/rcos-core/v0-1/layer-1-membership-system#38-artifacts" office:name=""><text:span text:style-name="Definition"><text:span text:style-name="T2">3.8.2</text:span></text:span></text:a></text:p>
      <text:p text:style-name="P9"><text:span text:style-name="T1">Justificativa — Por que separar a definição da lista</text:span></text:p>
      <text:p text:style-name="P9">Este documento define o que os estados significam; o registro vivo acompanha quem está em qual estado hoje. Mantê-los separados significa que as definições permanecem estáveis e governáveis enquanto as atribuições permanecem atualizadas — e ninguém precisa alterar um artefato ratificado toda vez que alguém entra ou sai.</text:p>
      <text:p text:style-name="P10"><text:span text:style-name="T1">Instruções — Como preencher</text:span></text:p>
      <text:p text:style-name="P10">Aponte para o sistema operacional ou documento onde as atribuições atuais de membro-para-estado são acompanhadas. Este artefato não deve precisar ser alterado toda vez que um membro entra ou sai.</text:p>
      <text:p text:style-name="P11">A lista viva de membros é mantida em <text:span text:style-name="T2">&lt;sistema / local&gt;</text:span>. Este documento define os estados; a ferramenta de registro mantém as atribuições atuais.</text:p>
      <text:p text:style-name="First_20_paragraph"><text:span text:style-name="T2">&lt;Link ou local do diretório vivo de membros.&gt;</text:span></text:p>
      <text:p text:style-name="Horizontal_20_Line"/>
      <text:h text:style-name="Heading_20_2" text:outline-level="2"><text:bookmark-start text:name="registro-de-ratificação"/>Registro de Ratificação<text:bookmark-end text:name="registro-de-ratificação"/></text:h>
      <text:list text:style-name="L4">
        <text:list-item>
          <text:p text:style-name="P12"><text:span text:style-name="T1">Adotado em:</text:span> </text:p>
        </text:list-item>
        <text:list-item>
          <text:p text:style-name="P12"><text:span text:style-name="T1">Tipo de decisão:</text:span> Estratégica</text:p>
        </text:list-item>
        <text:list-item>
          <text:p text:style-name="P12"><text:span text:style-name="T1">Versão:</text:span> &lt;versão&gt;</text:p>
        </text:list-item>
        <text:list-item>
          <text:p text:style-name="P12"><text:span text:style-name="T1">Registro da decisão:</text:span> &lt;link para o registro da decisão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56Z</meta:creation-date>
    <dc:date>2026-06-26T01:38:56Z</dc:date>
    <meta:user-defined meta:name="title-meta" meta:value-type="string">Registro de Estados de Associação</meta:user-defined>
  </office:meta>
</office:document-meta>
</file>